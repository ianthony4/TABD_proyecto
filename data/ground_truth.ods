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1.1244in"/>
    </style:style>
    <style:style style:name="co3" style:family="table-column">
      <style:table-column-properties fo:break-before="auto" style:column-width="9.6764in"/>
    </style:style>
    <style:style style:name="co4" style:family="table-column">
      <style:table-column-properties fo:break-before="auto" style:column-width="8.561in"/>
    </style:style>
    <style:style style:name="co5" style:family="table-column">
      <style:table-column-properties fo:break-before="auto" style:column-width="3.3382in"/>
    </style:style>
    <style:style style:name="co6" style:family="table-column">
      <style:table-column-properties fo:break-before="auto" style:column-width="6.3953in"/>
    </style:style>
    <style:style style:name="co7" style:family="table-column">
      <style:table-column-properties fo:break-before="auto" style:column-width="3.42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ground_tru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expected_answ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¿A qué edad se debe realizar el primer tamizaje de hemoglobina en niños nacidos a término para descartar anemia?</text:p>
          </table:table-cell>
          <table:table-cell office:value-type="string" calcext:value-type="string">
            <text:p>A los 6 meses de edad.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¿Qué examen de laboratorio es el estándar utilizado por el MINSA para el diagnóstico de anemia en los establecimientos de salud del primer nivel?</text:p>
          </table:table-cell>
          <table:table-cell office:value-type="string" calcext:value-type="string">
            <text:p>El dosaje de hemoglobina mediante hemoglobinómetro portátil o método de cianmetahemoglobina.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gún la tabla de suplementación preventiva</text:p>
          </table:table-cell>
          <table:table-cell office:value-type="string" calcext:value-type="string">
            <text:p><text:s/>¿qué dosis diaria de hierro en gotas (hierro polimaltosado) le corresponde a un niño prematuro de 2 meses de edad?</text:p>
          </table:table-cell>
          <table:table-cell office:value-type="string" calcext:value-type="string">
            <text:p>Le corresponden 2 mg de hierro elemental por kilogramo de peso al día</text:p>
          </table:table-cell>
          <table:table-cell office:value-type="string" calcext:value-type="string">
            <text:p><text:s/>administrado en gotas</text:p>
          </table:table-cell>
          <table:table-cell office:value-type="string" calcext:value-type="string">
            <text:p><text:s/>hasta los 6 meses de edad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 un bebé de 6 meses pesa 8 kg y no tiene anemia</text:p>
          </table:table-cell>
          <table:table-cell office:value-type="string" calcext:value-type="string">
            <text:p><text:s/>¿cuál es la dosis de suplementación preventiva y qué presentación farmacológica se usa?</text:p>
          </table:table-cell>
          <table:table-cell office:value-type="string" calcext:value-type="string">
            <text:p>Le corresponden 2 mg/kg/día (16 mg de hierro elemental en total) utilizando gotas de Sulfato Ferroso o Complejo Polimaltosado Férrico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 niño de 18 meses es diagnosticado con anemia. Su peso es de 12 kg. Según el esquema de tratamiento terapéutico</text:p>
          </table:table-cell>
          <table:table-cell office:value-type="string" calcext:value-type="string">
            <text:p><text:s/>¿cuál es la dosis diaria de hierro elemental que debe recibir?</text:p>
          </table:table-cell>
          <table:table-cell office:value-type="string" calcext:value-type="string">
            <text:p>La dosis terapéutica es de 3 mg de hierro elemental por kilogramo de peso al día. Por lo tanto</text:p>
          </table:table-cell>
          <table:table-cell office:value-type="string" calcext:value-type="string">
            <text:p><text:s/>debe recibir 36 mg de hierro elemental diariamente.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¿Qué se debe hacer si un niño vomita la dosis de suplemento de hierro dentro de los primeros 15 minutos de haberla ingerido?</text:p>
          </table:table-cell>
          <table:table-cell office:value-type="string" calcext:value-type="string">
            <text:p>Si el niño vomita antes de los 15 minutos o escupe la mayor parte</text:p>
          </table:table-cell>
          <table:table-cell office:value-type="string" calcext:value-type="string">
            <text:p><text:s/>se debe volver a administrar la misma dosis exacta.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 un niño de 11 meses con anemia leve que rechaza las gotas</text:p>
          </table:table-cell>
          <table:table-cell office:value-type="string" calcext:value-type="string">
            <text:p><text:s/>¿se puede usar el jarabe? Si pesa 10 kg</text:p>
          </table:table-cell>
          <table:table-cell office:value-type="string" calcext:value-type="string">
            <text:p><text:s/>¿cuántos mililitros de jarabe de sulfato ferroso (15mg/5ml) le tocan al día?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<text:s/>se puede usar jarabe. A 3 mg/kg/día necesita 30 mg de hierro. Usando la presentación de 15mg/5ml</text:p>
          </table:table-cell>
          <table:table-cell office:value-type="string" calcext:value-type="string">
            <text:p><text:s/>le corresponden exactamente 10 ml de jarabe al dí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¿Cuáles son los principales efectos secundarios de la suplementación con hierro en niños que las madres deben conocer para no asustarse?</text:p>
          </table:table-cell>
          <table:table-cell office:value-type="string" calcext:value-type="string">
            <text:p>Heces de color oscuro (negras)</text:p>
          </table:table-cell>
          <table:table-cell office:value-type="string" calcext:value-type="string">
            <text:p><text:s/>estreñimiento leve o</text:p>
          </table:table-cell>
          <table:table-cell office:value-type="string" calcext:value-type="string">
            <text:p><text:s/>en algunos casos</text:p>
          </table:table-cell>
          <table:table-cell office:value-type="string" calcext:value-type="string">
            <text:p><text:s/>malestar estomacal transitorio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gún el manual</text:p>
          </table:table-cell>
          <table:table-cell office:value-type="string" calcext:value-type="string">
            <text:p><text:s/>¿cuáles son los tres alimentos de origen animal ricos en hierro (hemo) que se deben priorizar en la alimentación complementaria de un niño de 8 meses?</text:p>
          </table:table-cell>
          <table:table-cell office:value-type="string" calcext:value-type="string">
            <text:p>Sangrecita</text:p>
          </table:table-cell>
          <table:table-cell office:value-type="string" calcext:value-type="string">
            <text:p><text:s/>bazo</text:p>
          </table:table-cell>
          <table:table-cell office:value-type="string" calcext:value-type="string">
            <text:p><text:s/>hígado y carnes rojas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¿Cuál es el ajuste o factor de corrección de hemoglobina que se debe aplicar para un niño que vive en Arequipa (altitud aproximada de 2300 m.s.n.m.) al interpretar su tamizaje?</text:p>
          </table:table-cell>
          <table:table-cell office:value-type="string" calcext:value-type="string">
            <text:p>Se debe restar 1.3 g/dL al valor de hemoglobina observado en el hemoglobinómetro debido a la altitud de 2300 m.s.n.m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26T20:21:53.593580683</dc:date>
    <meta:editing-duration>PT1M16S</meta:editing-duration>
    <meta:editing-cycles>1</meta:editing-cycles>
    <meta:document-statistic meta:table-count="1" meta:cell-count="50" meta:object-count="0"/>
    <meta:generator>LibreOffice/26.2.2.2$Linux_X86_64 LibreOffice_project/620$Build-2</meta:generator>
  </office:meta>
</office:document-meta>
</file>